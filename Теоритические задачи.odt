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fo:font-size="14pt" style:font-size-asian="14pt" style:font-size-complex="14pt"/>
    </style:style>
    <style:style style:name="P3" style:family="paragraph" style:parent-style-name="Text_20_body" style:list-style-name="L1">
      <style:text-properties fo:font-size="14pt" style:font-size-asian="14pt" style:font-size-complex="14pt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fo:font-size="14pt" style:font-size-asian="14pt" style:font-size-complex="14pt"/>
    </style:style>
    <style:style style:name="P5" style:family="paragraph" style:parent-style-name="Text_20_body" style:list-style-name="L2">
      <style:text-properties fo:font-size="14pt" style:font-size-asian="14pt" style:font-size-complex="14pt"/>
    </style:style>
    <style:style style:name="P6" style:family="paragraph" style:parent-style-name="Text_20_body" style:list-style-name="L3">
      <style:paragraph-properties fo:margin-top="0cm" fo:margin-bottom="0cm" style:contextual-spacing="false"/>
      <style:text-properties fo:font-size="14pt" style:font-size-asian="14pt" style:font-size-complex="14pt"/>
    </style:style>
    <style:style style:name="P7" style:family="paragraph" style:parent-style-name="Text_20_body" style:list-style-name="L3">
      <style:text-properties fo:font-size="14pt" style:font-size-asian="14pt" style:font-size-complex="14pt"/>
    </style:style>
    <style:style style:name="P8" style:family="paragraph" style:parent-style-name="Text_20_body">
      <style:text-properties officeooo:paragraph-rsid="001db233"/>
    </style:style>
    <style:style style:name="P9" style:family="paragraph" style:parent-style-name="Text_20_body">
      <style:text-properties fo:font-size="14pt" officeooo:paragraph-rsid="001db233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db233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1) Краткое описание предметной области</text:span></text:span></text:p>
      <text:p text:style-name="Text_20_body"><text:span text:style-name="T1">Предметная область — </text:span><text:span text:style-name="Strong_20_Emphasis"><text:span text:style-name="T1">автомобильные прокатные услуги (каршеринг и традиционный автопрокат)</text:span></text:span><text:span text:style-name="T1">. В неё входят процессы бронирования, аренды, возврата автомобилей, управления автопарком, расчёта стоимости услуг, а также взаимодействие между клиентами и компанией-оператором. Современные пользователи ожидают удобного, быстрого и прозрачного способа заказа автомобиля через цифровые каналы (веб-сайты, мобильные приложения), что делает автоматизацию этих процессов ключевым фактором конкурентоспособности.</text:span></text:p>
      <text:p text:style-name="Text_20_body"><text:span text:style-name="Strong_20_Emphasis"><text:span text:style-name="T1">2) Цели, задачи, объект и предмет исследования</text:span></text:span></text:p>
      <text:p text:style-name="Text_20_body"><text:span text:style-name="T1">Целью данного исследования является разработка информационной системы для бронирования автомобилей, сочетающей удобство для пользователя и эффективность управления со стороны компании. Особое внимание уделяется этапу проектирования: до начала программной реализации создаётся </text:span><text:span text:style-name="Strong_20_Emphasis"><text:span text:style-name="T1">макет интерфейса</text:span></text:span><text:span text:style-name="T1">, отражающий основные экраны и пользовательские сценарии, а также проводится </text:span><text:span text:style-name="Strong_20_Emphasis"><text:span text:style-name="T1">UML-моделирование</text:span></text:span><text:span text:style-name="T1">, позволяющее формализовать структуру и поведение системы.</text:span></text:p>
      <text:p text:style-name="P1">В рамках исследования решаются следующие ключевые задачи: </text:p>
      <text:list text:style-name="L1">
        <text:list-item>
          <text:p text:style-name="P2">анализ существующих решений и выявление требований заинтересованных сторон; </text:p>
        </text:list-item>
        <text:list-item>
          <text:p text:style-name="P2">проектирование пользовательского опыта через интерактивный макет; </text:p>
        </text:list-item>
        <text:list-item>
          <text:p text:style-name="P2">построение UML-диаграмм (прецедентов, классов, последовательностей) для описания функциональности и архитектуры системы; </text:p>
        </text:list-item>
        <text:list-item>
          <text:p text:style-name="P2">разработка базы данных и программной реализация основных модулей; </text:p>
        </text:list-item>
        <text:list-item>
          <text:p text:style-name="P3">верификация системы через тестирование и оценку удобства использования.</text:p>
        </text:list-item>
      </text:list>
      <text:p text:style-name="P1">Объектом исследования выступает процесс бронирования автомобилей в сфере автопроката и каршеринга, а предметом — сама информационная система, включая её интерфейс, логику работы и данные, спроектированные на основе макетов и UML-моделей. Такой подход обеспечивает не только техническую корректность решения, но и его ориентацию на реальные потребности пользователей и бизнеса.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P1"><text:soft-page-break/><text:span text:style-name="Strong_20_Emphasis">3) Актуальность работы</text:span></text:p>
      <text:p text:style-name="P1">Актуальность разработки информационной системы для бронирования автомобилей обусловлена глубокими изменениями в поведении потребителей и технологической среде. Современные пользователи всё чаще выбирают гибкие модели передвижения — такие как каршеринг или краткосрочный прокат — вместо постоянного владения автомобилем. Это связано не только с экономическими соображениями, но и с растущим вниманием к вопросам устойчивого городского развития.</text:p>
      <text:p text:style-name="P1">В ответ на эти вызовы компании вынуждены переходить к полностью цифровым сервисам, соответствующим ожиданиям клиентов. Сегодня пользователь ожидает, что сможет: </text:p>
      <text:list text:style-name="L2">
        <text:list-item>
          <text:p text:style-name="P4">за несколько минут найти свободный автомобиль, подходящий по классу, цене и местоположению; </text:p>
        </text:list-item>
        <text:list-item>
          <text:p text:style-name="P5">оформить бронь и оплатить её без лишних шагов и задержек.</text:p>
        </text:list-item>
      </text:list>
      <text:p text:style-name="P1">С другой стороны, для самого бизнеса автоматизация процессов бронирования решает ряд острых проблем. Ручное управление заказами ведёт к: </text:p>
      <text:list text:style-name="L3">
        <text:list-item>
          <text:p text:style-name="P6">увеличению числа ошибок и конфликтных ситуаций; </text:p>
        </text:list-item>
        <text:list-item>
          <text:p text:style-name="P7">снижению скорости обслуживания и, как следствие, потере клиентов.</text:p>
        </text:list-item>
      </text:list>
      <text:p text:style-name="P1">В этих условиях внедрение специализированной информационной системы становится не просто техническим улучшением, а стратегической необходимостью. Она позволяет одновременно повысить качество клиентского опыта и оптимизировать внутренние операции, обеспечивая устойчивое развитие компании в условиях высокой конкуренции.</text:p>
      <text:p text:style-name="P8"><text:span text:style-name="Strong_20_Emphasis"><text:span text:style-name="T2">4) </text:span></text:span><text:span text:style-name="Strong_20_Emphasis"><text:span text:style-name="T1">Основные понятия предметной области</text:span></text:span></text:p>
      <text:p text:style-name="P1">Предметная область «бронирование автомобиля» включает ряд ключевых понятий, отражающих как пользовательские, так и операционные аспекты сервиса. </text:p>
      <text:p text:style-name="Text_20_body"><text:span text:style-name="T1">Центральным элементом является </text:span><text:span text:style-name="Strong_20_Emphasis"><text:span text:style-name="T1">автомобиль</text:span></text:span><text:span text:style-name="T1"> — транспортное средство, принадлежащее компании или партнёру и доступное для временного использования. Каждый автомобиль характеризуется набором атрибутов: маркой, моделью, годом выпуска, типом кузова, классом (эконом, комфорт, премиум и др.), местоположением, техническим состоянием и стоимостью аренды.</text:span></text:p>
      <text:p text:style-name="Text_20_body"><text:span text:style-name="Strong_20_Emphasis"><text:span text:style-name="T1">Пользователь</text:span></text:span><text:span text:style-name="T1"> — физическое лицо, зарегистрированное в системе и имеющее право бронировать и использовать автомобили. Для обеспечения безопасности </text:span><text:soft-page-break/><text:span text:style-name="T1">и юридической корректности к пользователю могут быть привязаны данные водительского удостоверения, контактная информация и история аренд.</text:span></text:p>
      <text:p text:style-name="Text_20_body"><text:span text:style-name="Strong_20_Emphasis"><text:span text:style-name="T1">Бронирование</text:span></text:span><text:span text:style-name="T1"> представляет собой резервирование конкретного автомобиля на определённый временной интервал. Оно фиксирует намерение пользователя воспользоваться автомобилем и блокирует его для других клиентов на указанный срок. Бронь может быть подтверждённой (оплаченной) или предварительной (с возможностью отмены в течение льготного периода).</text:span></text:p>
      <text:p text:style-name="Text_20_body"><text:span text:style-name="Strong_20_Emphasis"><text:span text:style-name="T1">Тариф</text:span></text:span><text:span text:style-name="T1"> — правила расчёта стоимости аренды, которые могут зависеть от продолжительности бронирования, времени суток, дня недели, класса автомобиля, дополнительных услуг (страховка, GPS, детское кресло) и других факторов.</text:span></text:p>
      <text:p text:style-name="Text_20_body"><text:span text:style-name="T1">Наконец, </text:span><text:span text:style-name="Strong_20_Emphasis"><text:span text:style-name="T1">автопарк</text:span></text:span><text:span text:style-name="T1"> — это совокупность всех автомобилей, находящихся в распоряжении компании и управляемых через информационную систему. Эффективное управление автопарком включает учёт доступности, технического обслуживания, географического распределения и загруженности машин.</text:span></text:p>
      <text:p text:style-name="P9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3T15:57:34.713670827</dc:date>
    <meta:editing-duration>PT14M6S</meta:editing-duration>
    <meta:editing-cycles>1</meta:editing-cycles>
    <meta:document-statistic meta:table-count="0" meta:image-count="0" meta:object-count="0" meta:page-count="3" meta:paragraph-count="27" meta:word-count="563" meta:character-count="4859" meta:non-whitespace-character-count="4314"/>
    <meta:generator>LibreOffice/24.8.4.1$Linux_X86_64 LibreOffice_project/480$Build-1</meta:generator>
  </office:meta>
</office:document-meta>
</file>