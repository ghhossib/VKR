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3" style:family="paragraph" style:parent-style-name="Text_20_body" style:list-style-name="L1">
      <style:text-properties fo:font-size="14pt" style:font-size-asian="14pt" style:font-size-complex="14pt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fo:font-size="14pt" style:font-size-asian="14pt" style:font-size-complex="14pt"/>
    </style:style>
    <style:style style:name="P5" style:family="paragraph" style:parent-style-name="Text_20_body" style:list-style-name="L2">
      <style:text-properties fo:font-size="14pt" style:font-size-asian="14pt" style:font-size-complex="14pt"/>
    </style:style>
    <style:style style:name="P6" style:family="paragraph" style:parent-style-name="Text_20_body" style:list-style-name="L3">
      <style:paragraph-properties fo:margin-top="0cm" fo:margin-bottom="0cm" style:contextual-spacing="false"/>
      <style:text-properties fo:font-size="14pt" style:font-size-asian="14pt" style:font-size-complex="14pt"/>
    </style:style>
    <style:style style:name="P7" style:family="paragraph" style:parent-style-name="Text_20_body" style:list-style-name="L3">
      <style:text-properties fo:font-size="14pt" style:font-size-asian="14pt" style:font-size-complex="14pt"/>
    </style:style>
    <style:style style:name="P8" style:family="paragraph" style:parent-style-name="Text_20_body">
      <style:text-properties officeooo:paragraph-rsid="001db233"/>
    </style:style>
    <style:style style:name="P9" style:family="paragraph" style:parent-style-name="Text_20_body">
      <style:text-properties style:font-name="Liberation Serif" fo:font-size="14pt" style:font-size-asian="14pt" style:font-size-complex="14pt"/>
    </style:style>
    <style:style style:name="P10" style:family="paragraph" style:parent-style-name="Text_20_body">
      <style:text-properties fo:font-size="14pt" officeooo:paragraph-rsid="001db233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b233" style:font-size-asian="14pt" style:font-size-complex="14pt"/>
    </style:style>
    <style:style style:name="T3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Краткое описание предметной области</text:span></text:span></text:p>
      <text:p text:style-name="Text_20_body"><text:span text:style-name="T1">Предметная область — </text:span><text:span text:style-name="Strong_20_Emphasis"><text:span text:style-name="T1">автомобильные прокатные услуги (каршеринг и традиционный автопрокат)</text:span></text:span><text:span text:style-name="T1">. В неё входят процессы бронирования, аренды, возврата автомобилей, управления автопарком, расчёта стоимости услуг, а также взаимодействие между клиентами и компанией-оператором. Современные пользователи ожидают удобного, быстрого и прозрачного способа заказа автомобиля через цифровые каналы (веб-сайты, мобильные приложения), что делает автоматизацию этих процессов ключевым фактором конкурентоспособности.</text:span></text:p>
      <text:p text:style-name="Text_20_body"><text:span text:style-name="Strong_20_Emphasis"><text:span text:style-name="T1">2) Цели, задачи, объект и предмет исследования</text:span></text:span></text:p>
      <text:p text:style-name="Text_20_body"><text:span text:style-name="T1">Целью данного исследования является разработка информационной системы для бронирования автомобилей, сочетающей удобство для пользователя и эффективность управления со стороны компании. Особое внимание уделяется этапу проектирования: до начала программной реализации создаётся </text:span><text:span text:style-name="Strong_20_Emphasis"><text:span text:style-name="T1">макет интерфейса</text:span></text:span><text:span text:style-name="T1">, отражающий основные экраны и пользовательские сценарии, а также проводится </text:span><text:span text:style-name="Strong_20_Emphasis"><text:span text:style-name="T1">UML-моделирование</text:span></text:span><text:span text:style-name="T1">, позволяющее формализовать структуру и поведение системы.</text:span></text:p>
      <text:p text:style-name="P1">В рамках исследования решаются следующие ключевые задачи: </text:p>
      <text:list text:style-name="L1">
        <text:list-item>
          <text:p text:style-name="P2">анализ существующих решений и выявление требований заинтересованных сторон; </text:p>
        </text:list-item>
        <text:list-item>
          <text:p text:style-name="P2">проектирование пользовательского опыта через интерактивный макет; </text:p>
        </text:list-item>
        <text:list-item>
          <text:p text:style-name="P2">построение UML-диаграмм (прецедентов, классов, последовательностей) для описания функциональности и архитектуры системы; </text:p>
        </text:list-item>
        <text:list-item>
          <text:p text:style-name="P2">разработка базы данных и программной реализация основных модулей; </text:p>
        </text:list-item>
        <text:list-item>
          <text:p text:style-name="P3">верификация системы через тестирование и оценку удобства использования.</text:p>
        </text:list-item>
      </text:list>
      <text:p text:style-name="P1">Объектом исследования выступает процесс бронирования автомобилей в сфере автопроката и каршеринга, а предметом — сама информационная система, включая её интерфейс, логику работы и данные, спроектированные на основе макетов и UML-моделей. Такой подход обеспечивает не только техническую корректность решения, но и его ориентацию на реальные потребности пользователей и бизнеса.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1"><text:soft-page-break/><text:span text:style-name="Strong_20_Emphasis">3) Актуальность работы</text:span></text:p>
      <text:p text:style-name="P1">Актуальность разработки информационной системы для бронирования автомобилей обусловлена глубокими изменениями в поведении потребителей и технологической среде. Современные пользователи всё чаще выбирают гибкие модели передвижения — такие как каршеринг или краткосрочный прокат — вместо постоянного владения автомобилем. Это связано не только с экономическими соображениями, но и с растущим вниманием к вопросам устойчивого городского развития.</text:p>
      <text:p text:style-name="P1">В ответ на эти вызовы компании вынуждены переходить к полностью цифровым сервисам, соответствующим ожиданиям клиентов. Сегодня пользователь ожидает, что сможет: </text:p>
      <text:list text:style-name="L2">
        <text:list-item>
          <text:p text:style-name="P4">за несколько минут найти свободный автомобиль, подходящий по классу, цене и местоположению; </text:p>
        </text:list-item>
        <text:list-item>
          <text:p text:style-name="P5">оформить бронь и оплатить её без лишних шагов и задержек.</text:p>
        </text:list-item>
      </text:list>
      <text:p text:style-name="P1">С другой стороны, для самого бизнеса автоматизация процессов бронирования решает ряд острых проблем. Ручное управление заказами ведёт к: </text:p>
      <text:list text:style-name="L3">
        <text:list-item>
          <text:p text:style-name="P6">увеличению числа ошибок и конфликтных ситуаций; </text:p>
        </text:list-item>
        <text:list-item>
          <text:p text:style-name="P7">снижению скорости обслуживания и, как следствие, потере клиентов.</text:p>
        </text:list-item>
      </text:list>
      <text:p text:style-name="P1">В этих условиях внедрение специализированной информационной системы становится не просто техническим улучшением, а стратегической необходимостью. Она позволяет одновременно повысить качество клиентского опыта и оптимизировать внутренние операции, обеспечивая устойчивое развитие компании в условиях высокой конкуренции.</text:p>
      <text:p text:style-name="P8"><text:span text:style-name="Strong_20_Emphasis"><text:span text:style-name="T2">4) </text:span></text:span><text:span text:style-name="Strong_20_Emphasis"><text:span text:style-name="T1">Основные понятия предметной области</text:span></text:span></text:p>
      <text:p text:style-name="P1">Предметная область «бронирование автомобиля» включает ряд ключевых понятий, отражающих как пользовательские, так и операционные аспекты сервиса. </text:p>
      <text:p text:style-name="Text_20_body"><text:span text:style-name="T1">Центральным элементом является </text:span><text:span text:style-name="Strong_20_Emphasis"><text:span text:style-name="T1">автомобиль</text:span></text:span><text:span text:style-name="T1"> — транспортное средство, принадлежащее компании или партнёру и доступное для временного использования. Каждый автомобиль характеризуется набором атрибутов: маркой, моделью, годом выпуска, типом кузова, классом (эконом, комфорт, премиум и др.), местоположением, техническим состоянием и стоимостью аренды.</text:span></text:p>
      <text:p text:style-name="Text_20_body"><text:span text:style-name="Strong_20_Emphasis"><text:span text:style-name="T1">Пользователь</text:span></text:span><text:span text:style-name="T1"> — физическое лицо, зарегистрированное в системе и имеющее право бронировать и использовать автомобили. Для обеспечения безопасности </text:span><text:soft-page-break/><text:span text:style-name="T1">и юридической корректности к пользователю могут быть привязаны данные водительского удостоверения, контактная информация и история аренд.</text:span></text:p>
      <text:p text:style-name="Text_20_body"><text:span text:style-name="Strong_20_Emphasis"><text:span text:style-name="T1">Бронирование</text:span></text:span><text:span text:style-name="T1"> представляет собой резервирование конкретного автомобиля на определённый временной интервал. Оно фиксирует намерение пользователя воспользоваться автомобилем и блокирует его для других клиентов на указанный срок. Бронь может быть подтверждённой (оплаченной) или предварительной (с возможностью отмены в течение льготного периода).</text:span></text:p>
      <text:p text:style-name="Text_20_body"><text:span text:style-name="Strong_20_Emphasis"><text:span text:style-name="T1">Тариф</text:span></text:span><text:span text:style-name="T1"> — правила расчёта стоимости аренды, которые могут зависеть от продолжительности бронирования, времени суток, дня недели, класса автомобиля, дополнительных услуг (страховка, GPS, детское кресло) и других факторов.</text:span></text:p>
      <text:p text:style-name="Text_20_body"><text:span text:style-name="T1">Наконец, </text:span><text:span text:style-name="Strong_20_Emphasis"><text:span text:style-name="T1">автопарк</text:span></text:span><text:span text:style-name="T1"> — это совокупность всех автомобилей, находящихся в распоряжении компании и управляемых через информационную систему. Эффективное управление автопарком включает учёт доступности, технического обслуживания, географического распределения и загруженности машин.</text:span></text:p>
      <text:h text:style-name="Heading_20_3" text:outline-level="3"><text:span text:style-name="Strong_20_Emphasis"><text:span text:style-name="T3">5) Принципы разработки программного продукта</text:span></text:span></text:h>
      <text:p text:style-name="P9">Проектирование и реализация информационной системы для бронирования автомобилей базируется на совокупности взаимосвязанных инженерных принципов, которые направлены на создание надежного, удобного и адаптируемого продукта.</text:p>
      <text:p text:style-name="Text_20_body"><text:span text:style-name="T3">Принцип модульности является краеугольным камнем архитектуры. Система проектируется как совокупность слабосвязанных Django-приложений (</text:span><text:span text:style-name="Source_20_Text"><text:span text:style-name="T3">users</text:span></text:span><text:span text:style-name="T3">, </text:span><text:span text:style-name="Source_20_Text"><text:span text:style-name="T3">cars</text:span></text:span><text:span text:style-name="T3">, </text:span><text:span text:style-name="Source_20_Text"><text:span text:style-name="T3">booking</text:span></text:span><text:span text:style-name="T3">, </text:span><text:span text:style-name="Source_20_Text"><text:span text:style-name="T3">payments</text:span></text:span><text:span text:style-name="T3">, </text:span><text:span text:style-name="Source_20_Text"><text:span text:style-name="T3">api</text:span></text:span><text:span text:style-name="T3">), каждое из которых инкапсулирует логику отдельной предметной области. Например, приложение </text:span><text:span text:style-name="Source_20_Text"><text:span text:style-name="T3">cars</text:span></text:span><text:span text:style-name="T3"> отвечает исключительно за состояние и атрибуты автопарка, а </text:span><text:span text:style-name="Source_20_Text"><text:span text:style-name="T3">booking</text:span></text:span><text:span text:style-name="T3"> — за жизненный цикл заказа. Такое разделение обеспечивает высокую связность внутри модулей и слабую связанность между ними, что напрямую влияет на тестируемость, отладку и возможность независимого развития отдельных компонентов без риска нарушения работы всей системы.</text:span></text:p>
      <text:p text:style-name="P9">Принцип пользовательского центризма пронизывает все этапы проектирования — от анализа требований до верстки интерфейса. Это означает, что каждая функция и каждый элемент интерфейса оцениваются через призму ключевых пользовательских сценариев: «как клиент находит и бронирует автомобиль» и «как менеджер управляет автопарком». Цель — минимизировать когнитивную нагрузку и количество обязательных действий для достижения цели. Например, <text:soft-page-break/>процесс бронирования должен представлять собой линейный и интуитивно понятный «вороней», где пользователь последовательно выбирает даты, автомобиль, дополнительные услуги и завершает оплату, получая на каждом шаге четкую обратную связь и прозрачный расчет стоимости.</text:p>
      <text:p text:style-name="P9">Принцип безопасности реализуется на нескольких уровнях. На архитектурном уровне это четкое разделение прав доступа через систему ролей (клиент, менеджер, администратор) и изоляция данных. На уровне фреймворка используются встроенные механизмы Django для защиты от OWASP Top-10 уязвимостей: CSRF-токены для всех модифицирующих POST-запросов, автоматическая экранизация в шаблонах для предотвращения XSS, параметризованные запросы ORM, исключающие SQL-инъекции. На уровне данных обеспечивается целостность транзакций при финансовых операциях и хранение чувствительной информации (хеши паролей, токены платежных систем) в соответствии с регуляторными требованиями.</text:p>
      <text:p text:style-name="Text_20_body"><text:span text:style-name="T3">Принцип производительности и масштабируемости закладывается на этапе проектирования модели данных и построения запросов. Это подразумевает использование оптимальных типов полей в моделях Django и правильную индексацию в MySQL для ускорения поиска и фильтрации; проектирование эффективных запросов ORM с использованием </text:span><text:span text:style-name="Source_20_Text"><text:span text:style-name="T3">select_related</text:span></text:span><text:span text:style-name="T3"> и </text:span><text:span text:style-name="Source_20_Text"><text:span text:style-name="T3">prefetch_related</text:span></text:span><text:span text:style-name="T3"> для избегания проблемы N+1 запроса, критичной для страниц со списками автомобилей или детализацией заказов; создание архитектурного запаса в виде четко определенного API (DRF), который позволяет в будущем вынести часть нагрузки на отдельные сервисы или реализовать кэширование часто запрашиваемых данных (например, каталога доступных автомобилей).</text:span></text:p>
      <text:p text:style-name="P9">Принцип адаптивности и кроссбраузерности обеспечивается использованием фреймворка Bootstrap 5 как системной основы интерфейса. Bootstrap предоставляет не просто набор CSS-стилей, а целостную отзывчивую сетку и компоненты, которые гарантируют корректное отображение и удобство использования на устройствах с любым разрешением экрана — от смартфона до настольного монитора. Этот подход позволяет сосредоточить усилия на бизнес-логике, а не на рутинной отладке совместимости между браузерами, так как Bootstrap решает эти проблемы на уровне фреймворка.</text:p>
      <text:p text:style-name="P9">Таким образом, перечисленные принципы формируют целостную методологическую основу, где каждый следующий этап разработки логически вытекает из предыдущего: модульная архитектура облегчает реализацию безопасной и производительной бизнес-логики, которая, в свою очередь, воплощается в адаптивном интерфейсе, ориентированном на конечного <text:soft-page-break/>пользователя.</text:p>
      <text:h text:style-name="Heading_20_3" text:outline-level="3"><text:span text:style-name="Strong_20_Emphasis"><text:span text:style-name="T3">6) Целевая аудитория продукта: двойственность цифрового взаимодействия</text:span></text:span></text:h>
      <text:p text:style-name="P9">Разработка информационной системы для бронирования автомобилей требует понимания ее роли как посредника между двумя принципиально разными, но взаимозависимыми группами пользователей. Каждая из этих групп вступает во взаимодействие с системой через собственную логику, движимую уникальными мотивами и решая специфические задачи, однако их действия в совокупности формируют полный цикл услуги.</text:p>
      <text:p text:style-name="P9">Первая группа представляет собой внешних потребителей — клиентов сервиса. Это цифровые пользователи, чье поведение формируется в контексте экономики внимания и культуры мгновенного удовлетворения потребностей. Их взаимодействие с системой носит эпизодический, целеориентированный и эмоционально окрашенный характер. Клиент подходит к системе с уже сформированной потребностью в мобильности, будь то спонтанное решение добраться до другого района города или запланированная туристическая поездка. Ключевым драйвером для этой аудитории является не сама технология, а ощущение контроля, предсказуемости и легкости, которое она дает. Система должна компенсировать традиционные фрикции процесса аренды: неопределенность стоимости, необходимость личного присутствия и бумажного документооборота, задержки в подтверждении. Успешный пользовательский опыт измеряется способностью системы превратить потенциально стрессовую ситуацию (поиск транспорта в незнакомом месте или в цейтноте) в гладкий, почти незаметный ритуал, где каждый шаг — от выбора автомобиля на карте до бесконтактной разблокировки — интуитивно понятен и дает немедленную обратную связь. Таким образом, для клиента система становится не просто инструментом, а доверенным агентом, расширяющим его личную мобильность и чувство свободы.</text:p>
      <text:p text:style-name="P9">Вторая группа — это внутренние операторы, персонал компании. Их отношения с системой фундаментально иные: это профессиональные, рутинные и аналитические взаимодействия. Система для них выступает не как сервис, а как рабочая среда, производственный инструмент и источник управленческих инсайтов. Для оператора на линии (менеджера по клиентам, диспетчера) интерфейс является продолжением его когнитивного пространства, которое должно агрегировать разрозненные потоки информации в единую оперативную картину. Его эффективность зависит от того, насколько быстро система позволяет сопоставить запрос клиента с состоянием автопарка, историей <text:soft-page-break/>взаимоотношений и бизнес-правилами, чтобы принять обоснованное решение. Для администратора автопарка система является цифровым двойником физических активов; его задача — поддерживать соответствие между виртуальным статусом автомобиля (доступен, на обслуживании) и его реальным состоянием, планируя логистику и техобслуживание таким образом, чтобы минимизировать простой и максимизировать коэффициент использования.</text:p>
      <text:p text:style-name="P9">На стратегическом уровне, для владельцев бизнеса и аналитиков, система трансформируется из операционного инструмента в источник конкурентного преимущества. Ее ценность заключается в способности превращать сырые данные о транзакциях, перемещениях и поведении пользователей в формализованные знания. Паттерны спроса, выявленные алгоритмами системы, позволяют оптимизировать тарифную политику и распределение автомобилей по городу. Анализ отказов и успешных сценариев бронирования дает возможность улучшать пользовательский опыт на структурном уровне. В этом смысле система служит не только для автоматизации существующих процессов, но и для их постоянной ревизии и совершенствования, замыкая цикл обратной связи между бизнес-логикой и ее цифровой реализацией.</text:p>
      <text:p text:style-name="P9">Следовательно, проектирование системы — это не поиск компромисса между двумя аудиториями, а создание целостной экосистемы, в которой интерфейсы и логика для клиентов и операторов являются двумя сторонами одной медали. Удобный процесс бронирования для пользователя генерирует чистые, структурированные данные для оператора. Эффективные инструменты управления у оператора обеспечивают надежность и предсказуемость сервиса для клиента. Таким образом, понимание глубинных потребностей и моделей поведения обеих групп является не просто этапом анализа, а фундаментальным условием создания жизнеспособного продукта, где технологическая реализация напрямую воплощает экономическую и сервисную логику бизнеса.</text:p>
      <text:h text:style-name="Heading_20_3" text:outline-level="3"><text:span text:style-name="Strong_20_Emphasis"><text:span text:style-name="T3">7) Структура конечного продукта</text:span></text:span></text:h>
      <text:p text:style-name="P9">Конечный продукт представляет собой целостную архитектурную композицию, где технические решения напрямую вытекают из бизнес-логики предметной области. Система реализует парадигму серверно-ориентированной веб-разработки, в которой ядро бизнес-процессов инкапсулировано на стороне сервера, а клиентский интерфейс выступает интеллектуальным представлением этих процессов. Такая архитектура обеспечивает баланс между производительностью, безопасностью и скоростью разработки.</text:p>
      <text:p text:style-name="P9">Архитектурной основой выступает модель MVC (Model-View-Controller), <text:soft-page-break/>реализованная средствами фреймворка Django. Однако традиционная триада здесь получает специфическую интерпретацию, адаптированную к современным требованиям веб-разработки. Модели данных формируют не просто схему базы данных, а семантическое ядро предметной области — они описывают взаимосвязи между клиентами, автомобилями, бронированиями и платежами как систему бизнес-правил. Представления (Views) в Django выполняют двойную функцию: они обрабатывают HTTP-запросы, применяя сложную бизнес-логику (валидацию доступности, расчет стоимости, проверку прав доступа), и определяют контекст данных для передачи в шаблоны. Контроллеры в классическом понимании распределены между маршрутизацией URL, логикой представлений и middleware-слоями, что создает гибкий механизм обработки запросов.</text:p>
      <text:p text:style-name="P9">Уровень данных построен на реляционной модели, реализованной в СУБД MySQL. Выбор реляционной базы обусловлен необходимостью обеспечения ACID-транзакций, критически важных для финансовых операций и предотвращения конфликтов при одновременном бронировании одного автомобиля. Схема данных тщательно нормализована: сущности "Пользователь", "Автомобиль", "Тариф", "Бронирование" и "Платеж" связаны через внешние ключи, что гарантирует целостность данных на уровне базы. При этом денормализация применяется точечно, в расчетных полях, где требуется оптимизация производительности сложных запросов — например, для агрегации статистики по загрузке автопарка. Django ORM служит не просто промежуточным слоем, а активным инструментом проектирования: миграции, генерируемые на основе моделей Python, позволяют эволюционировать схеме данных контролируемым образом, сохраняя историю изменений и возможность отката.</text:p>
      <text:p text:style-name="P9">Бизнес-логика распределена между специализированными Django-приложениями, каждое из которых отвечает за конкретный домен системы. Приложение управления пользователями инкапсулирует не только аутентификацию и авторизацию, но и многоуровневую верификацию данных — от подтверждения электронной почты до проверки действительности водительского удостоверения. Приложение каталога автомобилей реализует сложные механизмы фильтрации и поиска, учитывающие географическое расположение, техническое состояние и текущую доступность транспортных средств. Наиболее комплексная логика сосредоточена в приложении бронирования, где алгоритмы расчета стоимости динамически учитывают тарифные планы, сезонные коэффициенты, продолжительность аренды и дополнительные услуги. Эта логика тесно интегрирована с механизмами <text:soft-page-break/>проверки доступности, которые предотвращают пересечение бронирований через атомарные транзакции на уровне базы данных.</text:p>
      <text:p text:style-name="P9">Пользовательский интерфейс построен на принципах прогрессивного улучшения (progressive enhancement). Базовый функционал — просмотр каталога, оформление заказа, управление профилем — работает через классические Django-шаблоны с серверным рендерингом, что обеспечивает быструю первоначальную загрузку и независимость от производительности клиентского устройства. Визуальная составляющая реализована на основе фреймворка Bootstrap 5, который предоставляет не просто набор стилей, а целостную дизайн-систему с адаптивной сеткой, типографикой и готовыми компонентами. Это позволяет сосредоточиться на проектировании пользовательских сценариев, а не на решении кроссбраузерных проблем. Динамические элементы интерфейса — интерактивные фильтры, динамический пересчет стоимости, валидация форм в реальном времени — реализованы на ванильном JavaScript, что обеспечивает отзывчивость без избыточной сложности клиентских фреймворков.</text:p>
      <text:p text:style-name="P9">Сервисный слой представлен RESTful API на основе Django REST Framework. Этот API выполняет стратегическую роль, выступая контролируемым интерфейсом для взаимодействия с системой. Он обслуживает асинхронные запросы от клиентского интерфейса, обеспечивает интеграцию с внешними системами (платежными шлюзами, сервисами геолокации, SMS-уведомлениями) и создает основу для возможного развития в сторону микросервисной архитектуры. Сериализаторы DRF выполняют сложную трансформацию данных между внутренними моделями Django и внешними представлениями, включая вложенные структуры, вычисляемые поля и условное отображение информации в зависимости от прав доступа пользователя.</text:p>
      <text:p text:style-name="P9">Административный интерфейс, построенный на стандартной панели Django Admin, подвергается глубокой кастомизации. Он трансформируется из простого CRUD-инструмента в полноценную систему управления бизнес-процессами, где менеджеры видят не просто списки объектов, а контекстную информацию: автомобили на карте с указанием их статуса, бронирования в календарном представлении, аналитические дашборды с ключевыми метриками бизнеса. Кастомизация достигается через переопределение шаблонов, создание специализированных действий (actions) для массовой обработки и интеграцию JavaScript-библиотек для визуализации данных.</text:p>
      <text:p text:style-name="P9">Таким образом, структура продукта представляет собой не набор технологий, а <text:soft-page-break/>осмысленную архитектуру, где каждый компонент занимает четкое положение в реализации бизнес-требований. Реляционная база обеспечивает надежность хранения и целостность транзакций, Django-фреймворк предоставляет каркас для реализации сложной бизнес-логики, серверный рендеринг гарантирует производительность и SEO-оптимизацию, а REST API создает основу для будущего масштабирования. Эта архитектура позволяет системе эффективно решать задачи как клиентов (удобство и скорость бронирования), так и операторов (управление автопарком и аналитика), образуя целостную экосистему цифровых услуг аренды автомобилей.</text:p>
      <text:h text:style-name="Heading_20_3" text:outline-level="3"><text:span text:style-name="Strong_20_Emphasis"><text:span text:style-name="T3">8) Аппаратное и программное обеспечение для разработки</text:span></text:span></text:h>
      <text:p text:style-name="P9">Разработка системы осуществляется в среде, максимально приближенной к производственной, что позволяет минимизировать риски при последующем развертывании. Основой служит рабочая станция разработчика с операционной системой семейства Linux (Ubuntu LTS), которая обеспечивает стабильную и предсказуемую работу серверных компонентов и соответствует наиболее распространенной целевой среде для Django-приложений.</text:p>
      <text:p text:style-name="Text_20_body"><text:span text:style-name="T3">Программный стек тщательно подобран с учетом требований к производительности, безопасности и удобству разработки. Ядро системы строится на интерпретаторе Python версии 3.11, который обеспечивает баланс между современными возможностями языка и стабильностью среды выполнения. Фреймворк Django в версии 4.2 LTS (Long-Term Support) выбран как каркас веб-приложения, предоставляющий долгосрочную поддержку и гарантии обратной совместимости, критически важные для учебного проекта с потенциальной перспективой дальнейшего развития. Для связи с базой данных используется драйвер </text:span><text:span text:style-name="Source_20_Text"><text:span text:style-name="T3">mysqlclient</text:span></text:span><text:span text:style-name="T3">, представляющий собой нативную реализацию протокола MySQL для Python, что обеспечивает оптимальную производительность при работе с СУБД.</text:span></text:p>
      <text:p text:style-name="P9">Управление версиями исходного кода осуществляется через распределенную систему Git, с использованием платформы GitHub в качестве центрального репозитория. Такой подход не только обеспечивает сохранность кода, но и позволяет организовать процесс разработки по методологии Git Flow, с созданием отдельных веток для новых функций, исправлений ошибок и подготовки релизов. Для контейнеризации сервисов применяется Docker, который создает изолированные среды для каждого компонента системы (самого Django-приложения, сервера MySQL, веб-сервера Nginx). Это гарантирует идентичность сред разработки, тестирования и эксплуатации, исключая классическую проблему «у меня на машине работает».</text:p>
      <text:p text:style-name="P9"><text:soft-page-break/>Инструментарий проектирования включает Figma для создания интерактивных прототипов пользовательского интерфейса. Этот инструмент позволяет визуализировать ключевые пользовательские сценарии до начала программирования, согласовать логику взаимодействия с научным руководителем и создать точные макеты, которые впоследствии используются как руководство при верстке с помощью Bootstrap. Для тестирования REST API применяется Postman — специализированная платформа, позволяющая создавать коллекции запросов, автоматизировать тестирование эндпоинтов и генерировать документацию API на основе реальных примеров использования.</text:p>
      <text:p text:style-name="P9">Среда разработки PyCharm Professional Edition выбрана как интегрированная платформа, обеспечивающая глубокую поддержку всего технологического стека. Ее преимущество заключается в интеллектуальной работе с кодом Django (автодополнение для моделей, шаблонов и URL-конфигураций), встроенных инструментах для работы с базами данных (визуальный редактор схемы, выполнение SQL-запросов) и тесной интеграции с системами контроля версий и Docker. Альтернативно может использоваться Visual Studio Code с набором специализированных расширений для Python, Django и фронтенд-технологий, что обеспечивает более легковесную, но менее интегрированную среду разработки.</text:p>
      <text:p text:style-name="P9">Таким образом, выбранный набор аппаратного и программного обеспечения образует целостную экосистему, где каждый инструмент занимает определенное место в процессе разработки: от проектирования интерфейса и управления кодом до контейнеризации и тестирования, обеспечивая эффективный и контролируемый workflow на всех этапах создания системы.</text:p>
      <text:h text:style-name="Heading_20_3" text:outline-level="3"><text:span text:style-name="Strong_20_Emphasis"><text:span text:style-name="T3">9) Основные этапы разработки</text:span></text:span></text:h>
      <text:p text:style-name="P9">Разработка системы организована по итеративной модели с акцентом на раннее прототипирование и поэтапную верификацию архитектурных решений. Такой подход позволяет выявлять потенциальные проблемы проектирования до начала масштабного программирования и последовательно наращивать функциональность, начиная с наиболее критичных для предметной области компонентов.</text:p>
      <text:p text:style-name="P9">Инициация проекта начинается с фазы анализа и проектирования, которая является фундаментом для всей последующей работы. На этом этапе проводится исследование предметной области через изучение существующих решений на рынке каршеринга и традиционного проката. Выявляются типичные пользовательские сценарии и болевые точки как клиентов, так и операторов. Результатом становятся формализованные требования в виде <text:soft-page-break/>пользовательских историй, которые группируются по приоритету и сложности реализации. Параллельно создается визуальная документация: интерактивные прототипы основных экранов системы в Figma, которые демонстрируют логику ключевых потоков (поиск автомобиля, процесс бронирования, личный кабинет), и набор UML-диаграмм. Диаграмма прецедентов фиксирует взаимодействие актеров с системой, диаграмма классов формализует структуру данных, а диаграммы последовательности описывают сценарии выполнения сложных операций, таких как расчет стоимости бронирования с учетом динамических тарифов.</text:p>
      <text:p text:style-name="Text_20_body"><text:span text:style-name="T3">Следующая фаза посвящена настройке инфраструктуры и созданию основы системы. Развертывается локальная среда разработки с использованием Docker Compose, которая включает контейнеры с MySQL, Django-приложением и веб-сервером. Инициализируется Django-проект с четкой структурой приложений, соответствующей доменам системы (</text:span><text:span text:style-name="Source_20_Text"><text:span text:style-name="T3">users</text:span></text:span><text:span text:style-name="T3">, </text:span><text:span text:style-name="Source_20_Text"><text:span text:style-name="T3">cars</text:span></text:span><text:span text:style-name="T3">, </text:span><text:span text:style-name="Source_20_Text"><text:span text:style-name="T3">booking</text:span></text:span><text:span text:style-name="T3">, </text:span><text:span text:style-name="Source_20_Text"><text:span text:style-name="T3">payments</text:span></text:span><text:span text:style-name="T3">, </text:span><text:span text:style-name="Source_20_Text"><text:span text:style-name="T3">api</text:span></text:span><text:span text:style-name="T3">). На этом же этапе создаются базовые модели данных с помощью Django ORM и генерируются первоначальные миграции, формирующие схему базы данных. Особое внимание уделяется настройке системы аутентификации и авторизации, включая кастомизацию пользовательской модели и реализацию ролевой модели доступа (клиент, менеджер, администратор).</text:span></text:p>
      <text:p text:style-name="P9">Фаза реализации ядра функциональности разбита на несколько последовательных итераций, каждая из которых завершается работающим прототипом. Первая итерация фокусируется на создании административной части системы: кастомизации панели Django Admin под нужды операторов автопарка, реализации CRUD-операций для управления автомобилями и пользователями, настройке фильтров и поиска. Вторая итерация посвящена разработке публичной части — созданию каталога автомобилей с системой фильтрации по датам, классу и местоположению, а также базового функционала бронирования с валидацией доступности. Третья итерация добавляет сложную бизнес-логику: систему тарификации с динамическим расчетом стоимости, интеграцию с платежным шлюзом (в демонстрационном режиме), механизмы подтверждения и отмены бронирований. На каждой итерации фронтенд-часть развивается параллельно с бэкендом: создаются Django-шаблоны, стилизуемые с помощью Bootstrap, и добавляется JavaScript-логика для интерактивных элементов.</text:p>
      <text:p text:style-name="P9">Завершающая фаза включает интеграцию компонентов, тестирование и документирование. Все разработанные модули объединяются в единую систему, после чего проводится комплексное функциональное тестирование по ключевым пользовательским сценариям. Тестирование охватывает не только <text:soft-page-break/>корректность работы, но и проверку граничных условий (например, попытка бронирования уже занятого автомобиля) и обработку ошибок. Отдельно проверяется адаптивность интерфейса на различных устройствах и кроссбраузерная совместимость. На основе результатов тестирования выполняется отладка и оптимизация производительности критичных запросов к базе данных. Параллельно ведется разработка документации: создается руководство пользователя с пошаговыми инструкциями по основным операциям, техническое описание архитектуры системы для разработчиков и инструкция по развертыванию. Итогом становится подготовка демонстрационного стенда с развернутой рабочей версией системы и формирование материалов для защиты проекта — структурированной пояснительной записки и презентации, наглядно демонстрирующей достижение поставленных целей.</text:p>
      <text:p text:style-name="P9">Такой поэтапный подход обеспечивает управляемость разработки, позволяет контролировать качество на каждом шаге и демонстрировать прогресс в виде серии конкретных, работающих результатов, что особенно важно для курсового проекта с ограниченными временными рамками.</text:p>
      <text:h text:style-name="Heading_20_3" text:outline-level="3"><text:span text:style-name="Strong_20_Emphasis"><text:span text:style-name="T3">10) Обоснование выбора языка программирования и технологий</text:span></text:span></text:h>
      <text:p text:style-name="P9">Выбор технологического стека для реализации системы бронирования автомобилей основан на анализе соответствия инструментов решаемым задачам, с учетом требований к надежности, скорости разработки и долгосрочной поддерживаемости. Центральным элементом стека является язык программирования Python и фреймворк Django, решение о применении которых обусловлено их концептуальным соответствием задачам быстрого создания сложных бизнес-ориентированных веб-приложений.</text:p>
      <text:p text:style-name="Text_20_body"><text:span text:style-name="T3">Python выбран как язык, обладающий уникальным балансом между выразительностью, читаемостью и мощностью экосистемы. Его синтаксис, ориентированный на ясность и минимализм, позволяет концентрироваться на логике предметной области, а не на технических деталях реализации. Для предметной области бронирования, где бизнес-правила (тарификация, валидация доступности) часто имеют сложную, многофакторную природу, эта читаемость становится критическим преимуществом, облегчая как первоначальную разработку, так и последующее сопровождение кода. Широкая экосистема библиотек Python предоставляет готовые решения для типовых задач: от работы с датами и временем (модуль </text:span><text:span text:style-name="Source_20_Text"><text:span text:style-name="T3">datetime</text:span></text:span><text:span text:style-name="T3">, библиотека </text:span><text:span text:style-name="Source_20_Text"><text:span text:style-name="T3">pytz</text:span></text:span><text:span text:style-name="T3">) до интеграции с внешними API (библиотеки </text:span><text:span text:style-name="Source_20_Text"><text:span text:style-name="T3">requests</text:span></text:span><text:span text:style-name="T3">, </text:span><text:span text:style-name="Source_20_Text"><text:span text:style-name="T3">celery</text:span></text:span><text:span text:style-name="T3"> для фоновых задач), что существенно ускоряет разработку.</text:span></text:p>
      <text:p text:style-name="P9"><text:soft-page-break/>Фреймворк Django представляет собой не просто набор инструментов для веб-разработки, а целостную философию построения приложений, известную как «батарейки в комплекте». Этот принцип проявляется в предоставлении интегрированных, отлаженных решений для фундаментальных аспектов веб-систем: ORM для работы с базой данных, система аутентификации, механизмы кэширования, защита от основных уязвимостей, административная панель. Для системы бронирования, где безопасность и надежность обработки данных являются обязательными требованиями, наличие встроенных механизмов защиты (CSRF-токены, экранизация HTML, параметризованные запросы к БД) снижает риски человеческой ошибки при реализации. Административная панель Django Admin, будучи глубоко кастомизированной, становится мощным инструментом для операторов автопарка, экономя недели разработки на создании с нуля интерфейса для внутреннего управления.</text:p>
      <text:p text:style-name="P9">Django REST Framework (DRF) выбран как естественное и зрелое расширение экосистемы Django для создания REST API. Его архитектура, построенная вокруг понятий сериализаторов и ViewSets, идеально соответствует задачам предоставления структурированного доступа к данным системы. Сериализаторы DRF выполняют не только преобразование объектов Django в JSON, но и сложную валидацию входящих данных, что критично для операций бронирования, где необходимо проверять корректность дат, соответствие тарифов и доступность автомобилей. ViewSets позволяют с минимальным кодом реализовать полный набор CRUD-операций, сохраняя при этом гибкость для реализации нестандартной бизнес-логики. DRF также предоставляет встроенную поддержку различных схем аутентификации (токены, JWT, сессии), что обеспечивает безопасность API с первого дня разработки.</text:p>
      <text:p text:style-name="P9">Выбор MySQL в качестве системы управления базами данных обусловлен требованиями к надежности и предсказуемости работы с транзакциями. Для предметной области бронирования, где одновременный доступ к данным о доступности автомобилей является типичным сценарием, механизм транзакций InnoDB гарантирует целостность данных и предотвращает возникновение конфликтов. Реляционная модель данных MySQL хорошо соответствует структурированной природе информации в системе (пользователи, автомобили, заказы — все имеют четкие связи), а поддержка внешних ключей на уровне базы данных обеспечивает дополнительную защиту от логических ошибок в приложении. Производительность и стабильность MySQL подтверждены многолетним опытом использования в высоконагруженных веб-приложениях, что делает ее надежным выбором для проекта с потенциалом роста.</text:p>
      <text:p text:style-name="P9">Для реализации пользовательского интерфейса выбран подход, основанный на <text:soft-page-break/>серверном рендеринге с помощью шаблонов Django и стилизации через Bootstrap 5. Этот подход является прагматичным ответом на требования учебного проекта, где основная ценность сосредоточена в бизнес-логике бэкенда, а не в сложной клиентской динамике. Bootstrap 5 предоставляет готовую, отзывчивую дизайн-систему, которая позволяет создавать профессиональный интерфейс без глубоких знаний CSS и часов отладки кроссбраузерной совместимости. Использование серверного рендеринга вместо одностраничного приложения (SPA) упрощает архитектуру, улучшает первоначальную скорость загрузки и обеспечивает лучшую SEO-оптимизацию, что может быть важно для публичного каталога автомобилей. Динамические элементы, необходимые для интерактивности (динамический расчет стоимости, валидация форм), реализуются с помощью ванильного JavaScript, что сохраняет простоту стека и избегает избыточности тяжелых клиентских фреймворков.</text:p>
      <text:p text:style-name="P9">Таким образом, выбранный технологический стек образует согласованную экосистему, где каждый компонент усиливает другие: Python обеспечивает ясность реализации бизнес-логики, Django предоставляет надежный каркас для веб-приложения, DRF создает гибкий интерфейс для интеграций, MySQL гарантирует целостность данных, а Bootstrap 5 позволяет быстро создать качественный интерфейс, фокусируя основные усилия на уникальных аспектах предметной области. Этот баланс между мощностью, безопасностью и скоростью разработки делает стек оптимальным для реализации системы бронирования автомобилей в рамках курсового проекта.</text:p>
      <text:h text:style-name="Heading_20_3" text:outline-level="3"><text:span text:style-name="Strong_20_Emphasis"><text:span text:style-name="T3">11) Интегрированная среда разработки (IDE)</text:span></text:span></text:h>
      <text:p text:style-name="P9">В качестве основной среды разработки выбран PyCharm Professional Edition. Этот выбор обусловлен глубокой и специализированной поддержкой всего технологического стека проекта. PyCharm не является универсальным текстовым редактором — это интеллектуальная среда, которая «понимает» структуру Django-проекта. Она обеспечивает навигацию по коду с переходом от шаблона к представлению (view) и далее к модели, автодополнение имен полей моделей и методов QuerySet, а также предоставляет специальный Django Console для интерактивной работы с ORM в контексте проекта.</text:p>
      <text:p text:style-name="P9">Для работы с веб-технологиями фронтенда среда предоставляет полноценный инструментарий. Встроенный редактор с подсветкой синтаксиса, подсказками и валидацией поддерживает HTML, CSS (включая препроцессоры) и JavaScript. Интеграция с Bootstrap реализуется через автодополнение классов CSS из фреймворка, что ускоряет верстку интерфейсов. Критически важной является тесная интеграция с системами контроля версий, в частности Git, <text:soft-page-break/>предоставляющая визуальный интерфейс для просмотра истории изменений, выполнения коммитов и разрешения конфликтов без использования командной строки.</text:p>
      <text:p text:style-name="P9">Отдельного внимания заслуживает комплекс инструментов для работы с базой данных. Database Tools в PyCharm предоставляют прямой визуальный доступ к схеме и данным MySQL. Разработчик может инспектировать таблицы, выполнять SQL-запросы с подсветкой синтаксиса и автодополнением, а также визуально редактировать связи и данные, что незаменимо при отладке сложных запросов ORM и валидации состояния данных. Для тестирования API, построенного на Django REST Framework, в IDE интегрирован полнофункциональный HTTP-клиент, позволяющий создавать, сохранять и выполнять коллекции запросов, аналогично Postman, но в едином рабочем пространстве.</text:p>
      <text:p text:style-name="Text_20_body"><text:span text:style-name="T3">В качестве дополнительного инструмента может использоваться Visual Studio Code с набором специализированных расширений (</text:span><text:span text:style-name="Source_20_Text"><text:span text:style-name="T3">ms-python.python</text:span></text:span><text:span text:style-name="T3">, </text:span><text:span text:style-name="Source_20_Text"><text:span text:style-name="T3">batisteo.vscode-django</text:span></text:span><text:span text:style-name="T3">). Его преимущество — легковесность и гибкая кастомизация под конкретные задачи, например, для тонкой настройки фронтенд-стэка или работы с конфигурационными файлами Docker. Однако для обеспечения целостности процесса разработки, где глубокое понимание структуры Django и интерактивная работа с данными являются приоритетом, PyCharm остается основным и наиболее эффективным выбором.</text:span></text:p>
      <text:p text:style-name="P9"/>
      <text:p text:style-name="P10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1" style:font-family-complex="'Droid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6T12:31:04.877045559</dc:date>
    <meta:editing-duration>PT21M22S</meta:editing-duration>
    <meta:editing-cycles>2</meta:editing-cycles>
    <meta:generator>LibreOffice/24.8.4.1$Linux_X86_64 LibreOffice_project/480$Build-1</meta:generator>
    <meta:document-statistic meta:table-count="0" meta:image-count="0" meta:object-count="0" meta:page-count="15" meta:paragraph-count="77" meta:word-count="3968" meta:character-count="34697" meta:non-whitespace-character-count="30774"/>
  </office:meta>
</office:document-meta>
</file>